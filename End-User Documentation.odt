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1">
      <style:text-properties style:font-name="Arial" officeooo:rsid="0010933e" officeooo:paragraph-rsid="0010933e"/>
    </style:style>
    <style:style style:name="P7" style:family="paragraph" style:parent-style-name="Text_20_body" style:list-style-name="L1">
      <style:text-properties officeooo:paragraph-rsid="0010933e"/>
    </style:style>
    <style:style style:name="P8" style:family="paragraph" style:parent-style-name="Heading_20_3">
      <style:text-properties style:font-name="Arial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10933e"/>
    </style:style>
    <style:style style:name="T3" style:family="text">
      <style:text-properties officeooo:rsid="0010933e"/>
    </style:style>
    <style:style style:name="T4" style:family="text">
      <style:text-properties style:font-name="Arial" officeooo:rsid="0011bb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The Demo</text:p>
      <text:p text:style-name="P2"/>
      <text:list text:style-name="L1">
        <text:list-item>
          <text:p text:style-name="P3">Connect the device to a power outlet. </text:p>
        </text:list-item>
        <text:list-item>
          <text:p text:style-name="P3">Plug the USB camera into one of the device’s USB ports. </text:p>
        </text:list-item>
        <text:list-item>
          <text:p text:style-name="P3">Turn on the device using the power button on the front panel. </text:p>
        </text:list-item>
        <text:list-item>
          <text:p text:style-name="P3">Turn on your laptop. </text:p>
        </text:list-item>
        <text:list-item>
          <text:p text:style-name="P4"><text:span text:style-name="T1">Download the required files from: </text:span><text:span text:style-name="Strong_20_Emphasis"><text:span text:style-name="T1">[download link]</text:span></text:span></text:p>
          <text:p text:style-name="P5">Required files:</text:p>
          <text:list>
            <text:list-item>
              <text:p text:style-name="P6">StartPreview</text:p>
            </text:list-item>
            <text:list-item>
              <text:p text:style-name="P7"><text:span text:style-name="Source_20_Text"><text:span text:style-name="T2">RunDemo</text:span></text:span></text:p>
            </text:list-item>
          </text:list>
        </text:list-item>
        <text:list-item>
          <text:p text:style-name="P3">Double-click <text:span text:style-name="T3">RunDemo</text:span> to start the demo. </text:p>
        </text:list-item>
        <text:list-item>
          <text:p text:style-name="P3">The first time you run the demo, you may see a security prompt asking for a passphrase and password. Enter the credentials provided to you and continue. </text:p>
        </text:list-item>
        <text:list-item>
          <text:p text:style-name="P5">When the demo is running, a browser window will open automatically.</text:p>
        </text:list-item>
      </text:list>
      <text:h text:style-name="P8" text:outline-level="3">Closing the Demo Safely</text:h>
      <text:list text:style-name="L2">
        <text:list-item>
          <text:p text:style-name="P9">Close the browser window first. </text:p>
        </text:list-item>
        <text:list-item>
          <text:p text:style-name="P10"><text:span text:style-name="T1">Then click the </text:span><text:span text:style-name="T4">dark</text:span><text:span text:style-name="T1"> window that opened when you started </text:span><text:span text:style-name="Source_20_Text"><text:span text:style-name="T1">RunDemo</text:span></text:span><text:span text:style-name="T1">. </text:span></text:p>
        </text:list-item>
        <text:list-item>
          <text:p text:style-name="P11"><text:span text:style-name="T1">Press the </text:span><text:span text:style-name="Strong_20_Emphasis"><text:span text:style-name="T1">Enter</text:span></text:span><text:span text:style-name="T1"> key on your keyboard to stop the demo safely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13T10:59:17.514926200</dc:date>
    <meta:editing-duration>PT3M2S</meta:editing-duration>
    <meta:editing-cycles>4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6" meta:word-count="138" meta:character-count="744" meta:non-whitespace-character-count="627"/>
  </office:meta>
</office:document-meta>
</file>