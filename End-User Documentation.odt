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18pt" fo:font-weight="bold" officeooo:rsid="003343e9" officeooo:paragraph-rsid="003343e9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3d1c4a" officeooo:paragraph-rsid="003d1c4a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style:font-name="Arial" fo:font-size="12pt" fo:font-weight="normal" officeooo:rsid="003343e9" officeooo:paragraph-rsid="003343e9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428929"/>
    </style:style>
    <style:style style:name="P8" style:family="paragraph" style:parent-style-name="Text_20_body" style:list-style-name="L1">
      <style:paragraph-properties fo:margin-top="0in" fo:margin-bottom="0.0575in" style:contextual-spacing="false"/>
    </style:style>
    <style:style style:name="P9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10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11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>
      <style:text-properties style:font-name="Arial" officeooo:rsid="0015b8c9" officeooo:paragraph-rsid="0015b8c9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7" style:family="paragraph" style:parent-style-name="Text_20_body" style:list-style-name="L2"/>
    <style:style style:name="P18" style:family="paragraph" style:parent-style-name="Text_20_body">
      <style:text-properties style:font-name="Arial" officeooo:rsid="00454f25" officeooo:paragraph-rsid="00454f25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2pt" fo:font-weight="normal" officeooo:rsid="0022dca6" officeooo:paragraph-rsid="00165ae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Arial" fo:font-size="12pt" fo:font-weight="normal" officeooo:rsid="00165aee" officeooo:paragraph-rsid="0053b052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30" style:family="paragraph" style:parent-style-name="Heading_20_3">
      <style:text-properties style:font-name="Arial" officeooo:paragraph-rsid="001853df"/>
    </style:style>
    <style:style style:name="P31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style:font-name="Arial" fo:font-weight="normal" officeooo:rsid="001853df" officeooo:paragraph-rsid="001853df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662b69" officeooo:paragraph-rsid="00662b69" style:font-size-asian="12.25pt" style:font-weight-asian="bold" style:font-size-complex="14pt" style:font-weight-complex="bold"/>
    </style:style>
    <style:style style:name="P34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802c3a" officeooo:paragraph-rsid="00802c3a" style:font-size-asian="10.5pt" style:font-weight-asian="normal" style:font-size-complex="12pt" style:font-weight-complex="normal"/>
    </style:style>
    <style:style style:name="P35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02c3a" officeooo:paragraph-rsid="00802c3a" style:font-size-asian="10.5pt" style:font-weight-asian="normal" style:font-size-complex="12pt" style:font-weight-complex="normal"/>
    </style:style>
    <style:style style:name="P36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0f1b6" officeooo:paragraph-rsid="0080f1b6" style:font-size-asian="10.5pt" style:font-weight-asian="normal" style:font-size-complex="12pt" style:font-weight-complex="normal"/>
    </style:style>
    <style:style style:name="P37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11eae" officeooo:paragraph-rsid="00811eae" style:font-size-asian="10.5pt" style:font-weight-asian="normal" style:font-size-complex="12pt" style:font-weight-complex="normal"/>
    </style:style>
    <style:style style:name="P38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182df" officeooo:paragraph-rsid="008182d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margin-top="0in" fo:margin-bottom="0.0181in" style:contextual-spacing="false" fo:line-height="115%"/>
      <style:text-properties style:font-name="Arial" fo:font-size="12pt" fo:font-weight="normal" officeooo:rsid="008182df" officeooo:paragraph-rsid="008182d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662b69" officeooo:paragraph-rsid="00662b69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3a9d89" officeooo:paragraph-rsid="003a9d89" style:font-size-asian="12.25pt" style:font-weight-asian="bold" style:font-size-complex="14pt" style:font-weight-complex="bold"/>
    </style:style>
    <style:style style:name="P42" style:family="paragraph" style:parent-style-name="Text_20_body" style:list-style-name="L9">
      <style:paragraph-properties fo:margin-top="0in" fo:margin-bottom="0.0181in" style:contextual-spacing="false" fo:line-height="115%"/>
      <style:text-properties style:font-name="Arial" fo:font-size="12pt" fo:font-weight="normal" officeooo:rsid="003a9d89" officeooo:paragraph-rsid="003a9d89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d0f92" officeooo:paragraph-rsid="004d0f92" style:font-size-asian="12.25pt" style:font-weight-asian="bold" style:font-size-complex="14pt" style:font-weight-complex="bold"/>
    </style:style>
    <style:style style:name="P46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b7798" officeooo:paragraph-rsid="004b7798" style:font-size-asian="12.25pt" style:font-weight-asian="bold" style:font-size-complex="14pt" style:font-weight-complex="bold"/>
    </style:style>
    <style:style style:name="P47" style:family="paragraph" style:parent-style-name="Text_20_body" style:list-style-name="L10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9" style:family="paragraph" style:parent-style-name="Text_20_body" style:list-style-name="L11">
      <style:paragraph-properties fo:margin-top="0in" fo:margin-bottom="0.0181in" style:contextual-spacing="false" fo:line-height="115%"/>
      <style:text-properties style:font-name="Arial" fo:font-size="12pt" fo:font-weight="normal" officeooo:rsid="0056b9c6" officeooo:paragraph-rsid="0056b9c6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bold" officeooo:rsid="00891cb4" officeooo:paragraph-rsid="00891cb4" style:font-size-asian="10.5pt" style:font-weight-asian="bold" style:font-size-complex="12pt" style:font-weight-complex="bold"/>
    </style:style>
    <style:style style:name="P51" style:family="paragraph" style:parent-style-name="Text_20_body" style:list-style-name="L12">
      <style:paragraph-properties fo:margin-top="0in" fo:margin-bottom="0.0181in" style:contextual-spacing="false" fo:line-height="115%"/>
      <style:text-properties style:font-name="Arial" fo:font-weight="normal" officeooo:rsid="00891cb4" officeooo:paragraph-rsid="00891cb4" style:font-weight-asian="normal" style:font-weight-complex="normal"/>
    </style:style>
    <style:style style:name="T1" style:family="text">
      <style:text-properties officeooo:rsid="00165aee"/>
    </style:style>
    <style:style style:name="T2" style:family="text">
      <style:text-properties officeooo:rsid="003499d9"/>
    </style:style>
    <style:style style:name="T3" style:family="text">
      <style:text-properties officeooo:rsid="0035dc60"/>
    </style:style>
    <style:style style:name="T4" style:family="text">
      <style:text-properties officeooo:rsid="00349b91"/>
    </style:style>
    <style:style style:name="T5" style:family="text">
      <style:text-properties style:font-name="Arial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officeooo:rsid="0010933e"/>
    </style:style>
    <style:style style:name="T8" style:family="text">
      <style:text-properties fo:font-weight="bold" officeooo:rsid="0010933e" style:font-weight-asian="bold" style:font-weight-complex="bold"/>
    </style:style>
    <style:style style:name="T9" style:family="text">
      <style:text-properties officeooo:rsid="003e88b1"/>
    </style:style>
    <style:style style:name="T10" style:family="text">
      <style:text-properties fo:font-weight="bold" officeooo:rsid="003e88b1" style:font-weight-asian="bold" style:font-weight-complex="bold"/>
    </style:style>
    <style:style style:name="T11" style:family="text">
      <style:text-properties fo:font-weight="normal" officeooo:rsid="003e88b1" style:font-weight-asian="normal" style:font-weight-complex="normal"/>
    </style:style>
    <style:style style:name="T12" style:family="text">
      <style:text-properties officeooo:rsid="002050c3"/>
    </style:style>
    <style:style style:name="T13" style:family="text">
      <style:text-properties fo:font-weight="bold" officeooo:rsid="002050c3" style:font-weight-asian="bold" style:font-weight-complex="bold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216da3" style:font-weight-asian="bold" style:font-weight-complex="bold"/>
    </style:style>
    <style:style style:name="T16" style:family="text">
      <style:text-properties style:font-name="Arial" officeooo:rsid="00216da3"/>
    </style:style>
    <style:style style:name="T17" style:family="text">
      <style:text-properties officeooo:rsid="0021d05b"/>
    </style:style>
    <style:style style:name="T18" style:family="text">
      <style:text-properties officeooo:rsid="00225afa"/>
    </style:style>
    <style:style style:name="T19" style:family="text">
      <style:text-properties officeooo:rsid="0022dca6"/>
    </style:style>
    <style:style style:name="T20" style:family="text">
      <style:text-properties officeooo:rsid="00372f82"/>
    </style:style>
    <style:style style:name="T21" style:family="text">
      <style:text-properties officeooo:rsid="0037f12c"/>
    </style:style>
    <style:style style:name="T22" style:family="text">
      <style:text-properties officeooo:rsid="0039c94b"/>
    </style:style>
    <style:style style:name="T23" style:family="text">
      <style:text-properties officeooo:rsid="003a43fe"/>
    </style:style>
    <style:style style:name="T24" style:family="text">
      <style:text-properties officeooo:rsid="00232b04"/>
    </style:style>
    <style:style style:name="T25" style:family="text">
      <style:text-properties officeooo:rsid="001eea15"/>
    </style:style>
    <style:style style:name="T26" style:family="text">
      <style:text-properties officeooo:rsid="0024e431"/>
    </style:style>
    <style:style style:name="T27" style:family="text">
      <style:text-properties officeooo:rsid="0025855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ea15" style:font-weight-asian="normal" style:font-weight-complex="normal"/>
    </style:style>
    <style:style style:name="T31" style:family="text">
      <style:text-properties officeooo:rsid="00691685"/>
    </style:style>
    <style:style style:name="T32" style:family="text">
      <style:text-properties officeooo:rsid="0083930d"/>
    </style:style>
    <style:style style:name="T33" style:family="text">
      <style:text-properties officeooo:rsid="00556499"/>
    </style:style>
    <style:style style:name="T34" style:family="text">
      <style:text-properties fo:font-size="12pt" officeooo:rsid="004bb667" style:font-size-asian="12pt" style:font-size-complex="12pt"/>
    </style:style>
    <style:style style:name="T35" style:family="text">
      <style:text-properties fo:font-size="12pt" officeooo:rsid="004d0f92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4f5b15" style:font-size-asian="12pt" style:font-size-complex="12pt"/>
    </style:style>
    <style:style style:name="T38" style:family="text">
      <style:text-properties fo:font-size="12pt" officeooo:rsid="004d868d" style:font-size-asian="12pt" style:font-size-complex="12pt"/>
    </style:style>
    <style:style style:name="T39" style:family="text">
      <style:text-properties fo:font-weight="bold" officeooo:rsid="0056b9c6" style:font-weight-asian="bold" style:font-weight-complex="bold"/>
    </style:style>
    <style:style style:name="T40" style:family="text">
      <style:text-properties fo:font-size="14pt" fo:font-weight="bold" officeooo:rsid="0056b9c6" style:font-size-asian="14pt" style:font-weight-asian="bold" style:font-size-complex="14pt" style:font-weight-complex="bold"/>
    </style:style>
    <style:style style:name="T41" style:family="text">
      <style:text-properties fo:font-weight="bold" officeooo:rsid="005940ed" style:font-weight-asian="bold" style:font-weight-complex="bold"/>
    </style:style>
    <style:style style:name="T42" style:family="text">
      <style:text-properties fo:font-weight="bold" officeooo:rsid="0056b9c6" style:font-size-asian="10.5pt" style:font-weight-asian="bold" style:font-weight-complex="bold"/>
    </style:style>
    <style:style style:name="T43" style:family="text">
      <style:text-properties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 Demo Alert Captioning</text:p>
      <text:p text:style-name="P2">Overview</text:p>
      <text:p text:style-name="P3"><text:tab/>This demo runs on the NUC device.</text:p>
      <text:p text:style-name="P3"/>
      <text:p text:style-name="P4"><text:span text:style-name="T1">A. </text:span>Setting up The Demo</text:p>
      <text:p text:style-name="P5"/>
      <text:list text:style-name="L1">
        <text:list-item>
          <text:p text:style-name="P6">Connect the <text:span text:style-name="T2">NUC</text:span> device to a power outlet.</text:p>
        </text:list-item>
        <text:list-item>
          <text:p text:style-name="P6">Plug the USB camera into one of the <text:span text:style-name="T3">NUC </text:span>device’s USB ports.</text:p>
        </text:list-item>
        <text:list-item>
          <text:p text:style-name="P6">Turn on the <text:span text:style-name="T4">NUC </text:span>device using the power button on the front panel.</text:p>
        </text:list-item>
        <text:list-item>
          <text:p text:style-name="P7">Turn on your laptop.</text:p>
        </text:list-item>
        <text:list-item>
          <text:p text:style-name="P8"><text:span text:style-name="T5">Download the required files from: </text:span><text:a xlink:type="simple" xlink:href="https://github.com/Donokop/Live-Alert-Demo-Setup" text:style-name="Internet_20_link" text:visited-style-name="Visited_20_Internet_20_Link"><text:span text:style-name="Strong_20_Emphasis"><text:span text:style-name="T6">https://github.com/Donokop/Live-Alert-Demo-Setup</text:span></text:span></text:a></text:p>
          <text:p text:style-name="P9">Required files:</text:p>
          <text:list>
            <text:list-item>
              <text:p text:style-name="P10"><text:a xlink:type="simple" xlink:href="https://github.com/Donokop/Live-Alert-Demo-Setup/blob/main/StartPreview.ps1" text:style-name="Internet_20_link" text:visited-style-name="Visited_20_Internet_20_Link">StartPreview</text:a></text:p>
            </text:list-item>
            <text:list-item>
              <text:p text:style-name="P11"><text:a xlink:type="simple" xlink:href="https://github.com/Donokop/Live-Alert-Demo-Setup/blob/main/RunDemo.bat" text:style-name="Internet_20_link" text:visited-style-name="Visited_20_Internet_20_Link"><text:span text:style-name="Source_20_Text"><text:span text:style-name="T7">RunDemo</text:span></text:span></text:a></text:p>
            </text:list-item>
          </text:list>
        </text:list-item>
        <text:list-item>
          <text:p text:style-name="P6">Double-click <text:span text:style-name="T8">RunDemo</text:span> to start the demo. </text:p>
        </text:list-item>
        <text:list-item>
          <text:p text:style-name="P6">The first time you run the demo, you may see a security prompt asking for a passphrase. Simply press <text:span text:style-name="Strong_20_Emphasis">Enter</text:span> to skip the passphrase prompt (and press <text:span text:style-name="Strong_20_Emphasis">Enter</text:span> again if asked to confirm). When prompted for a password, enter the credentials <text:span text:style-name="T9">(Password: </text:span><text:span text:style-name="T10">IntelDemo</text:span><text:span text:style-name="T11">)</text:span> and continue.</text:p>
        </text:list-item>
        <text:list-item>
          <text:p text:style-name="P12">When the demo is running, a browser window will open automatically.</text:p>
        </text:list-item>
      </text:list>
      <text:p text:style-name="P13">If this <text:span text:style-name="T12">does not work, use </text:span><text:span text:style-name="T13">Option B</text:span><text:span text:style-name="T12"> below.</text:span></text:p>
      <text:h text:style-name="P14" text:outline-level="3">Closing the Demo Safely <text:span text:style-name="T12">(Option A)</text:span></text:h>
      <text:list text:style-name="L2">
        <text:list-item>
          <text:p text:style-name="P15">Close the browser window first.</text:p>
        </text:list-item>
        <text:list-item>
          <text:p text:style-name="P16"><text:span text:style-name="T5">Click the terminal window that opened when you started </text:span><text:span text:style-name="T14">RunDemo</text:span><text:span text:style-name="T5">.</text:span></text:p>
        </text:list-item>
        <text:list-item>
          <text:p text:style-name="P17"><text:span text:style-name="T5">Press </text:span><text:span text:style-name="T15">Enter</text:span><text:span text:style-name="T16"> to stop the demo safely</text:span><text:span text:style-name="T5">.</text:span></text:p>
        </text:list-item>
      </text:list>
      <text:p text:style-name="P18">To safely turn off the NUC device, look at the last page of this manual.</text:p>
      <text:p text:style-name="P19"/>
      <text:p text:style-name="P20">B. Setting up <text:span text:style-name="T17">t</text:span>he Demo on the <text:span text:style-name="T18">D</text:span>evice <text:span text:style-name="T18">D</text:span>irectly <text:span text:style-name="T19">(Fallback)</text:span></text:p>
      <text:p text:style-name="P21">Use this option only if option A fails.</text:p>
      <text:p text:style-name="P22"/>
      <text:p text:style-name="P23"><text:tab/>Requirements:</text:p>
      <text:list text:style-name="L3">
        <text:list-item>
          <text:list>
            <text:list-item>
              <text:p text:style-name="P24">keyboard</text:p>
            </text:list-item>
            <text:list-item>
              <text:p text:style-name="P24">mouse</text:p>
            </text:list-item>
          </text:list>
        </text:list-item>
      </text:list>
      <text:p text:style-name="P22"/>
      <text:list text:style-name="L4">
        <text:list-item>
          <text:p text:style-name="P25">Connect the <text:span text:style-name="T20">NUC</text:span> device to a power outlet.</text:p>
        </text:list-item>
        <text:list-item>
          <text:p text:style-name="P25">Plug the USB camera into one of the <text:span text:style-name="T21">NUC </text:span>device’s USB ports.</text:p>
        </text:list-item>
        <text:list-item>
          <text:p text:style-name="P25">Plug in your keyboard and mouse into the <text:span text:style-name="T22">NUC </text:span>device’<text:span text:style-name="T22">s</text:span> ports.</text:p>
        </text:list-item>
        <text:list-item>
          <text:p text:style-name="P26">Turn on the <text:span text:style-name="T23">NUC </text:span>device using the power button on the front panel.</text:p>
        </text:list-item>
        <text:list-item>
          <text:p text:style-name="P27"><text:span text:style-name="T24">At</text:span> log, <text:span text:style-name="T24">sign</text:span> in <text:span text:style-name="T25">as</text:span> sshuser <text:span text:style-name="T24">using the provided credentials</text:span> <text:span text:style-name="T9">(Password: </text:span><text:span text:style-name="T10">IntelDemo</text:span><text:span text:style-name="T9">).</text:span></text:p>
        </text:list-item>
        <text:list-item>
          <text:p text:style-name="P28">Once logged in search for “RunDemo” and double-click it to start the <text:span text:style-name="T26">d</text:span>emo.</text:p>
        </text:list-item>
      </text:list>
      <text:p text:style-name="P29"><text:soft-page-break/></text:p>
      <text:h text:style-name="P30" text:outline-level="3">Closing the Demo Safely <text:span text:style-name="T27">(Option B)</text:span></text:h>
      <text:list text:style-name="L5">
        <text:list-item>
          <text:p text:style-name="P31">Close the browser window first.</text:p>
        </text:list-item>
        <text:list-item>
          <text:p text:style-name="P31">Then click the window that opened when you started RunDemo.</text:p>
        </text:list-item>
        <text:list-item>
          <text:p text:style-name="P31">Press <text:span text:style-name="T28">Ctrl</text:span><text:span text:style-name="T29"> </text:span><text:span text:style-name="T30">+</text:span><text:span text:style-name="T29"> </text:span><text:span text:style-name="T28">C</text:span><text:span text:style-name="T29"> </text:span><text:span text:style-name="T30">t</text:span><text:span text:style-name="T29">o stop the demo safely.</text:span></text:p>
        </text:list-item>
      </text:list>
      <text:p text:style-name="P32"/>
      <text:p text:style-name="P33">Adding video <text:span text:style-name="T31">files to the Demo (They are preinstalled on the NUC)</text:span></text:p>
      <text:list text:style-name="L6">
        <text:list-item>
          <text:p text:style-name="P34">Open the <text:span text:style-name="T28">Live Demo Alert</text:span> window</text:p>
        </text:list-item>
        <text:list-item>
          <text:p text:style-name="P34">For each video stream:</text:p>
        </text:list-item>
      </text:list>
      <text:list text:style-name="L7">
        <text:list-item>
          <text:p text:style-name="P35">Enter the following information in the “<text:span text:style-name="T28">RTSP URL</text:span>” field:</text:p>
          <text:list>
            <text:list-item>
              <text:p text:style-name="P35">rtsp://localhost:8555/f1 - Crossroad car accident video.</text:p>
            </text:list-item>
            <text:list-item>
              <text:p text:style-name="P36">rtsp://localhost:8555/f2 - Highway car accident video.</text:p>
            </text:list-item>
            <text:list-item>
              <text:p text:style-name="P37">rtsp://localhost:8555/f3 - Collection of car accident videos.</text:p>
            </text:list-item>
            <text:list-item>
              <text:p text:style-name="P37">rtsp://localhost:8555/f4 - Collection of car accident videos.</text:p>
            </text:list-item>
          </text:list>
        </text:list-item>
        <text:list-item>
          <text:p text:style-name="P38">In the “<text:span text:style-name="T28">STREAM NAME</text:span>” field, enter a name for the stream (for example: Video1, Video2, etc.)</text:p>
        </text:list-item>
      </text:list>
      <text:list text:style-name="L8">
        <text:list-item>
          <text:p text:style-name="P39">After entering both: <text:span text:style-name="T32">a stream RTSP URL mentioned above</text:span> and stream name, click <text:span text:style-name="T28">Add New Stream.</text:span></text:p>
        </text:list-item>
      </text:list>
      <text:p text:style-name="P40"/>
      <text:p text:style-name="P41">Turning off the NUC device safely</text:p>
      <text:list text:style-name="L9">
        <text:list-item>
          <text:p text:style-name="P42">Locate the power button on the NUC device’s front panel.</text:p>
        </text:list-item>
        <text:list-item>
          <text:p text:style-name="P43">Click the power button and hold it <text:span text:style-name="T33">for approximately five seconds and then wait </text:span>until the light turns off.</text:p>
        </text:list-item>
        <text:list-item>
          <text:p text:style-name="P43">You can now safely unplug the NUC device from a power outlet.</text:p>
        </text:list-item>
      </text:list>
      <text:p text:style-name="P44"/>
      <text:p text:style-name="P44"/>
      <text:p text:style-name="P45">If something stops working:</text:p>
      <text:p text:style-name="P46"><text:tab/><text:span text:style-name="T34">1. </text:span><text:span text:style-name="T35">If the script</text:span><text:span text:style-name="T36"> cannot connect to </text:span><text:span text:style-name="T37">the </text:span><text:span text:style-name="T36">demo and </text:span><text:span text:style-name="T38">a globe icon appears in the bottom-left corner of the screen:</text:span></text:p>
      <text:list text:style-name="L10">
        <text:list-item>
          <text:p text:style-name="P47">Restart your device.</text:p>
        </text:list-item>
      </text:list>
      <text:p text:style-name="P48"><text:span text:style-name="T39"><text:tab/>2.</text:span><text:span text:style-name="T40"> </text:span><text:span text:style-name="T41">I</text:span><text:span text:style-name="T39">f</text:span><text:span text:style-name="T42"> the script shows yellow text or says "RETRYABLE_SSH_FAILURE" it means you have disconnected from the “IntelDemoWLAN” network:</text:span></text:p>
      <text:list text:style-name="L11">
        <text:list-item>
          <text:p text:style-name="P49">Manually connect to the “IntelDemoWLAN” network (Password: <text:span text:style-name="T28">IntelDemo).</text:span></text:p>
        </text:list-item>
      </text:list>
      <text:p text:style-name="P50"><text:tab/><text:span text:style-name="T43">3. If the video abruptly stops or metrics don’t show:</text:span></text:p>
      <text:list text:style-name="L12">
        <text:list-item>
          <text:p text:style-name="P51">Refresh the network p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28T11:27:27.495647400</dc:date>
    <meta:editing-duration>PT2H30M9S</meta:editing-duration>
    <meta:editing-cycles>87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57" meta:word-count="542" meta:character-count="3057" meta:non-whitespace-character-count="2605"/>
  </office:meta>
</office:document-meta>
</file>