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4" style:family="paragraph" style:parent-style-name="Text_20_body" style:list-style-name="L1">
      <style:paragraph-properties fo:margin-top="0in" fo:margin-bottom="0.0575in" style:contextual-spacing="false"/>
    </style:style>
    <style:style style:name="P5" style:family="paragraph" style:parent-style-name="Text_20_body" style:list-style-name="L1">
      <style:paragraph-properties fo:margin-top="0in" fo:margin-bottom="0.0575in" style:contextual-spacing="false"/>
      <style:text-properties style:font-name="Arial"/>
    </style:style>
    <style:style style:name="P6" style:family="paragraph" style:parent-style-name="Text_20_body" style:list-style-name="L1">
      <style:paragraph-properties fo:margin-top="0in" fo:margin-bottom="0.0181in" style:contextual-spacing="false"/>
      <style:text-properties style:font-name="Arial" officeooo:rsid="0010933e" officeooo:paragraph-rsid="0010933e"/>
    </style:style>
    <style:style style:name="P7" style:family="paragraph" style:parent-style-name="Text_20_body" style:list-style-name="L1">
      <style:paragraph-properties fo:margin-top="0in" fo:margin-bottom="0.0181in" style:contextual-spacing="false"/>
      <style:text-properties officeooo:paragraph-rsid="0010933e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">
      <style:text-properties style:font-name="Arial" officeooo:rsid="0015b8c9" officeooo:paragraph-rsid="0015b8c9"/>
    </style:style>
    <style:style style:name="P10" style:family="paragraph" style:parent-style-name="Heading_20_3">
      <style:text-properties style:font-name="Arial"/>
    </style:style>
    <style:style style:name="P11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officeooo:rsid="002050c3" officeooo:paragraph-rsid="002050c3"/>
    </style:style>
    <style:style style:name="P13" style:family="paragraph" style:parent-style-name="Text_20_body" style:list-style-name="L2"/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fo:font-size="14pt" fo:font-weight="bold" officeooo:rsid="00165aee" officeooo:paragraph-rsid="00165aee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2pt" fo:font-weight="normal" officeooo:rsid="0022dca6" officeooo:paragraph-rsid="00165aee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Arial" fo:font-size="12pt" fo:font-weight="normal" officeooo:rsid="00165aee" officeooo:paragraph-rsid="00232b04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Arial" fo:font-size="12pt" fo:font-weight="normal" officeooo:rsid="0016b37f" officeooo:paragraph-rsid="0016b37f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1853df" officeooo:paragraph-rsid="001853df" style:font-size-asian="10.5pt" style:font-weight-asian="normal" style:font-size-complex="12pt" style:font-weight-complex="normal"/>
    </style:style>
    <style:style style:name="P24" style:family="paragraph" style:parent-style-name="Heading_20_3">
      <style:text-properties style:font-name="Arial" officeooo:paragraph-rsid="001853df"/>
    </style:style>
    <style:style style:name="P25" style:family="paragraph" style:parent-style-name="Text_20_body" style:list-style-name="L5">
      <style:paragraph-properties fo:margin-top="0in" fo:margin-bottom="0.0181in" style:contextual-spacing="false" fo:line-height="115%"/>
      <style:text-properties style:font-name="Arial" officeooo:rsid="001853df" officeooo:paragraph-rsid="001853df"/>
    </style:style>
    <style:style style:name="T1" style:family="text">
      <style:text-properties officeooo:rsid="00165aee"/>
    </style:style>
    <style:style style:name="T2" style:family="text">
      <style:text-properties style:font-name="Arial"/>
    </style:style>
    <style:style style:name="T3" style:family="text">
      <style:text-properties style:font-name="Arial" officeooo:rsid="0010933e"/>
    </style:style>
    <style:style style:name="T4" style:family="text">
      <style:text-properties fo:font-weight="bold" officeooo:rsid="0010933e" style:font-weight-asian="bold" style:font-weight-complex="bold"/>
    </style:style>
    <style:style style:name="T5" style:family="text">
      <style:text-properties officeooo:rsid="002050c3"/>
    </style:style>
    <style:style style:name="T6" style:family="text">
      <style:text-properties fo:font-weight="bold" officeooo:rsid="002050c3" style:font-weight-asian="bold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216da3" style:font-weight-asian="bold" style:font-weight-complex="bold"/>
    </style:style>
    <style:style style:name="T9" style:family="text">
      <style:text-properties style:font-name="Arial" officeooo:rsid="00216da3"/>
    </style:style>
    <style:style style:name="T10" style:family="text">
      <style:text-properties officeooo:rsid="0021d05b"/>
    </style:style>
    <style:style style:name="T11" style:family="text">
      <style:text-properties officeooo:rsid="00225afa"/>
    </style:style>
    <style:style style:name="T12" style:family="text">
      <style:text-properties officeooo:rsid="0022dca6"/>
    </style:style>
    <style:style style:name="T13" style:family="text">
      <style:text-properties officeooo:rsid="00232b04"/>
    </style:style>
    <style:style style:name="T14" style:family="text">
      <style:text-properties officeooo:rsid="001eea15"/>
    </style:style>
    <style:style style:name="T15" style:family="text">
      <style:text-properties officeooo:rsid="0024e431"/>
    </style:style>
    <style:style style:name="T16" style:family="text">
      <style:text-properties officeooo:rsid="0025855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eea1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. </text:span>Setting up The Demo</text:p>
      <text:p text:style-name="P2"/>
      <text:list text:style-name="L1">
        <text:list-item>
          <text:p text:style-name="P3">Connect the device to a power outlet. </text:p>
        </text:list-item>
        <text:list-item>
          <text:p text:style-name="P3">Plug the USB camera into one of the device’s USB ports. </text:p>
        </text:list-item>
        <text:list-item>
          <text:p text:style-name="P3">Turn on the device using the power button on the front panel. </text:p>
        </text:list-item>
        <text:list-item>
          <text:p text:style-name="P3">Turn on your laptop. </text:p>
        </text:list-item>
        <text:list-item>
          <text:p text:style-name="P4"><text:span text:style-name="T2">Download the required files from: </text:span><text:span text:style-name="Strong_20_Emphasis"><text:span text:style-name="T2">[download link]</text:span></text:span></text:p>
          <text:p text:style-name="P5">Required files:</text:p>
          <text:list>
            <text:list-item>
              <text:p text:style-name="P6">StartPreview</text:p>
            </text:list-item>
            <text:list-item>
              <text:p text:style-name="P7"><text:span text:style-name="Source_20_Text"><text:span text:style-name="T3">RunDemo</text:span></text:span></text:p>
            </text:list-item>
          </text:list>
        </text:list-item>
        <text:list-item>
          <text:p text:style-name="P3">Double-click <text:span text:style-name="T4">RunDemo</text:span> to start the demo. </text:p>
        </text:list-item>
        <text:list-item>
          <text:p text:style-name="P3">The first time you run the demo, you may see a security prompt asking for a passphrase. Simply press <text:span text:style-name="Strong_20_Emphasis">Enter</text:span> to skip the passphrase prompt (and press <text:span text:style-name="Strong_20_Emphasis">Enter</text:span> again if asked to confirm). When prompted for a password, enter the credentials provided to you and continue.</text:p>
        </text:list-item>
        <text:list-item>
          <text:p text:style-name="P8">When the demo is running, a browser window will open automatically.</text:p>
        </text:list-item>
      </text:list>
      <text:p text:style-name="P9">If this <text:span text:style-name="T5">does not work, use </text:span><text:span text:style-name="T6">Option B</text:span><text:span text:style-name="T5"> below.</text:span></text:p>
      <text:h text:style-name="P10" text:outline-level="3">Closing the Demo Safely <text:span text:style-name="T5">(Option A)</text:span></text:h>
      <text:list text:style-name="L2">
        <text:list-item>
          <text:p text:style-name="P11">Close the browser window first. </text:p>
        </text:list-item>
        <text:list-item>
          <text:p text:style-name="P12"><text:span text:style-name="T2">Click the terminal window that opened when you started </text:span><text:span text:style-name="T7">RunDemo</text:span><text:span text:style-name="T2">.</text:span></text:p>
        </text:list-item>
        <text:list-item>
          <text:p text:style-name="P13"><text:span text:style-name="T2">Press </text:span><text:span text:style-name="T8">Enter</text:span><text:span text:style-name="T9"> to stop the demo safely</text:span><text:span text:style-name="T2">.</text:span></text:p>
        </text:list-item>
      </text:list>
      <text:p text:style-name="P14"/>
      <text:p text:style-name="P15">B. Setting up <text:span text:style-name="T10">t</text:span>he Demo on the <text:span text:style-name="T11">D</text:span>evice <text:span text:style-name="T11">D</text:span>irectly <text:span text:style-name="T12">(Fallback)</text:span></text:p>
      <text:p text:style-name="P16">Use this option only if option A fails.</text:p>
      <text:p text:style-name="P17"/>
      <text:p text:style-name="P18"><text:tab/>Requirements:</text:p>
      <text:list text:style-name="L3">
        <text:list-item>
          <text:list>
            <text:list-item>
              <text:p text:style-name="P19">keyboard</text:p>
            </text:list-item>
            <text:list-item>
              <text:p text:style-name="P19">mouse</text:p>
            </text:list-item>
          </text:list>
        </text:list-item>
      </text:list>
      <text:p text:style-name="P17"/>
      <text:list text:style-name="L4">
        <text:list-item>
          <text:p text:style-name="P20">Connect the device to a power outlet.</text:p>
        </text:list-item>
        <text:list-item>
          <text:p text:style-name="P20">Plug the USB camera into one of the device’s USB ports.</text:p>
        </text:list-item>
        <text:list-item>
          <text:p text:style-name="P20">Plug in your keyboard and mouse into the device ports.</text:p>
        </text:list-item>
        <text:list-item>
          <text:p text:style-name="P21">Turn on the device using the power button on the front panel.</text:p>
        </text:list-item>
        <text:list-item>
          <text:p text:style-name="P21"><text:span text:style-name="T13">At</text:span> log, <text:span text:style-name="T13">sign</text:span> in <text:span text:style-name="T14">as</text:span> sshuser <text:span text:style-name="T13">using the provided credentials</text:span>.</text:p>
        </text:list-item>
        <text:list-item>
          <text:p text:style-name="P22">Once logged in search for “RunDemo” and double-click it to start the <text:span text:style-name="T15">d</text:span>emo.</text:p>
        </text:list-item>
      </text:list>
      <text:p text:style-name="P23"/>
      <text:h text:style-name="P24" text:outline-level="3">Closing the Demo Safely <text:span text:style-name="T16">(Option B)</text:span></text:h>
      <text:list text:style-name="L5">
        <text:list-item>
          <text:p text:style-name="P25">Close the browser window first.</text:p>
        </text:list-item>
        <text:list-item>
          <text:p text:style-name="P25">Then click the window that opened when you started RunDemo.</text:p>
        </text:list-item>
        <text:list-item>
          <text:p text:style-name="P25">Press <text:span text:style-name="T17">Ctrl</text:span><text:span text:style-name="T18"> </text:span><text:span text:style-name="T19">+</text:span><text:span text:style-name="T18"> </text:span><text:span text:style-name="T17">C</text:span><text:span text:style-name="T18"> </text:span><text:span text:style-name="T19">t</text:span><text:span text:style-name="T18">o stop the demo safel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14T11:07:09.423060500</dc:date>
    <meta:editing-duration>PT26M50S</meta:editing-duration>
    <meta:editing-cycles>24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32" meta:word-count="288" meta:character-count="1527" meta:non-whitespace-character-count="1288"/>
  </office:meta>
</office:document-meta>
</file>