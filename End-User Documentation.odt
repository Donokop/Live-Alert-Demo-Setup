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18pt" fo:font-weight="bold" officeooo:rsid="003343e9" officeooo:paragraph-rsid="003343e9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3d1c4a" officeooo:paragraph-rsid="003d1c4a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style:font-name="Arial" fo:font-size="12pt" fo:font-weight="normal" officeooo:rsid="003343e9" officeooo:paragraph-rsid="003343e9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428929"/>
    </style:style>
    <style:style style:name="P8" style:family="paragraph" style:parent-style-name="Text_20_body" style:list-style-name="L1">
      <style:paragraph-properties fo:margin-top="0in" fo:margin-bottom="0.0575in" style:contextual-spacing="false"/>
    </style:style>
    <style:style style:name="P9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10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11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>
      <style:text-properties style:font-name="Arial" officeooo:rsid="0015b8c9" officeooo:paragraph-rsid="0015b8c9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7" style:family="paragraph" style:parent-style-name="Text_20_body" style:list-style-name="L2"/>
    <style:style style:name="P18" style:family="paragraph" style:parent-style-name="Text_20_body">
      <style:text-properties style:font-name="Arial" officeooo:rsid="00454f25" officeooo:paragraph-rsid="00454f25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2pt" fo:font-weight="normal" officeooo:rsid="0022dca6" officeooo:paragraph-rsid="00165ae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Arial" fo:font-size="12pt" fo:font-weight="normal" officeooo:rsid="00165aee" officeooo:paragraph-rsid="0053b052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30" style:family="paragraph" style:parent-style-name="Heading_20_3">
      <style:text-properties style:font-name="Arial" officeooo:paragraph-rsid="001853df"/>
    </style:style>
    <style:style style:name="P31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style:font-name="Arial" fo:font-weight="normal" officeooo:rsid="001853df" officeooo:paragraph-rsid="001853df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3a9d89" officeooo:paragraph-rsid="003a9d89" style:font-size-asian="12.25pt" style:font-weight-asian="bold" style:font-size-complex="14pt" style:font-weight-complex="bold"/>
    </style:style>
    <style:style style:name="P34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3a9d89" officeooo:paragraph-rsid="003a9d89" style:font-size-asian="12pt" style:font-weight-asian="normal" style:font-size-complex="12pt" style:font-weight-complex="normal"/>
    </style:style>
    <style:style style:name="P35" style:family="paragraph" style:parent-style-name="Text_20_body" style:list-style-name="L6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3ab4a2" officeooo:paragraph-rsid="003ab4a2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d0f92" officeooo:paragraph-rsid="004d0f92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in" fo:margin-bottom="0.0181in" style:contextual-spacing="false" fo:line-height="115%"/>
      <style:text-properties style:font-name="Arial" fo:font-size="14pt" fo:font-weight="bold" officeooo:rsid="004b7798" officeooo:paragraph-rsid="004b7798" style:font-size-asian="12.25pt" style:font-weight-asian="bold" style:font-size-complex="14pt" style:font-weight-complex="bold"/>
    </style:style>
    <style:style style:name="P39" style:family="paragraph" style:parent-style-name="Text_20_body" style:list-style-name="L7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style:font-name="Arial" fo:font-size="12pt" fo:font-weight="normal" officeooo:rsid="004b7798" officeooo:paragraph-rsid="004b7798" style:font-size-asian="12pt" style:font-weight-asian="normal" style:font-size-complex="12pt" style:font-weight-complex="normal"/>
    </style:style>
    <style:style style:name="P41" style:family="paragraph" style:parent-style-name="Text_20_body" style:list-style-name="L8">
      <style:paragraph-properties fo:margin-top="0in" fo:margin-bottom="0.0181in" style:contextual-spacing="false" fo:line-height="115%"/>
      <style:text-properties style:font-name="Arial" fo:font-size="12pt" fo:font-weight="normal" officeooo:rsid="0056b9c6" officeooo:paragraph-rsid="0056b9c6" style:font-size-asian="10.5pt" style:font-weight-asian="normal" style:font-size-complex="12pt" style:font-weight-complex="normal"/>
    </style:style>
    <style:style style:name="T1" style:family="text">
      <style:text-properties officeooo:rsid="00165aee"/>
    </style:style>
    <style:style style:name="T2" style:family="text">
      <style:text-properties officeooo:rsid="003499d9"/>
    </style:style>
    <style:style style:name="T3" style:family="text">
      <style:text-properties officeooo:rsid="0035dc60"/>
    </style:style>
    <style:style style:name="T4" style:family="text">
      <style:text-properties officeooo:rsid="00349b91"/>
    </style:style>
    <style:style style:name="T5" style:family="text">
      <style:text-properties style:font-name="Arial"/>
    </style:style>
    <style:style style:name="T6" style:family="text">
      <style:text-properties style:font-name="Arial" officeooo:rsid="0010933e"/>
    </style:style>
    <style:style style:name="T7" style:family="text">
      <style:text-properties fo:font-weight="bold" officeooo:rsid="0010933e" style:font-weight-asian="bold" style:font-weight-complex="bold"/>
    </style:style>
    <style:style style:name="T8" style:family="text">
      <style:text-properties officeooo:rsid="003e88b1"/>
    </style:style>
    <style:style style:name="T9" style:family="text">
      <style:text-properties fo:font-weight="bold" officeooo:rsid="003e88b1" style:font-weight-asian="bold" style:font-weight-complex="bold"/>
    </style:style>
    <style:style style:name="T10" style:family="text">
      <style:text-properties fo:font-weight="normal" officeooo:rsid="003e88b1" style:font-weight-asian="normal" style:font-weight-complex="normal"/>
    </style:style>
    <style:style style:name="T11" style:family="text">
      <style:text-properties officeooo:rsid="002050c3"/>
    </style:style>
    <style:style style:name="T12" style:family="text">
      <style:text-properties fo:font-weight="bold" officeooo:rsid="002050c3" style:font-weight-asian="bold" style:font-weight-complex="bold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weight="bold" officeooo:rsid="00216da3" style:font-weight-asian="bold" style:font-weight-complex="bold"/>
    </style:style>
    <style:style style:name="T15" style:family="text">
      <style:text-properties style:font-name="Arial" officeooo:rsid="00216da3"/>
    </style:style>
    <style:style style:name="T16" style:family="text">
      <style:text-properties officeooo:rsid="0021d05b"/>
    </style:style>
    <style:style style:name="T17" style:family="text">
      <style:text-properties officeooo:rsid="00225afa"/>
    </style:style>
    <style:style style:name="T18" style:family="text">
      <style:text-properties officeooo:rsid="0022dca6"/>
    </style:style>
    <style:style style:name="T19" style:family="text">
      <style:text-properties officeooo:rsid="00372f82"/>
    </style:style>
    <style:style style:name="T20" style:family="text">
      <style:text-properties officeooo:rsid="0037f12c"/>
    </style:style>
    <style:style style:name="T21" style:family="text">
      <style:text-properties officeooo:rsid="0039c94b"/>
    </style:style>
    <style:style style:name="T22" style:family="text">
      <style:text-properties officeooo:rsid="003a43fe"/>
    </style:style>
    <style:style style:name="T23" style:family="text">
      <style:text-properties officeooo:rsid="00232b04"/>
    </style:style>
    <style:style style:name="T24" style:family="text">
      <style:text-properties officeooo:rsid="001eea15"/>
    </style:style>
    <style:style style:name="T25" style:family="text">
      <style:text-properties officeooo:rsid="0024e431"/>
    </style:style>
    <style:style style:name="T26" style:family="text">
      <style:text-properties officeooo:rsid="0025855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eea15" style:font-weight-asian="normal" style:font-weight-complex="normal"/>
    </style:style>
    <style:style style:name="T30" style:family="text">
      <style:text-properties officeooo:rsid="00556499"/>
    </style:style>
    <style:style style:name="T31" style:family="text">
      <style:text-properties fo:font-size="12pt" officeooo:rsid="004bb667" style:font-size-asian="12pt" style:font-size-complex="12pt"/>
    </style:style>
    <style:style style:name="T32" style:family="text">
      <style:text-properties fo:font-size="12pt" officeooo:rsid="004d0f92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4f5b15" style:font-size-asian="12pt" style:font-size-complex="12pt"/>
    </style:style>
    <style:style style:name="T35" style:family="text">
      <style:text-properties fo:font-size="12pt" officeooo:rsid="004d868d" style:font-size-asian="12pt" style:font-size-complex="12pt"/>
    </style:style>
    <style:style style:name="T36" style:family="text">
      <style:text-properties fo:font-weight="bold" officeooo:rsid="0056b9c6" style:font-weight-asian="bold" style:font-weight-complex="bold"/>
    </style:style>
    <style:style style:name="T37" style:family="text">
      <style:text-properties fo:font-size="14pt" fo:font-weight="bold" officeooo:rsid="0056b9c6" style:font-size-asian="14pt" style:font-weight-asian="bold" style:font-size-complex="14pt" style:font-weight-complex="bold"/>
    </style:style>
    <style:style style:name="T38" style:family="text">
      <style:text-properties fo:font-weight="bold" officeooo:rsid="005940ed" style:font-weight-asian="bold" style:font-weight-complex="bold"/>
    </style:style>
    <style:style style:name="T39" style:family="text">
      <style:text-properties fo:font-weight="bold" officeooo:rsid="0056b9c6" style:font-size-asian="10.5pt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 Demo Alert Captioning</text:p>
      <text:p text:style-name="P2">Overview</text:p>
      <text:p text:style-name="P3"><text:tab/>This demo runs on the NUC device.</text:p>
      <text:p text:style-name="P3"/>
      <text:p text:style-name="P4"><text:span text:style-name="T1">A. </text:span>Setting up The Demo</text:p>
      <text:p text:style-name="P5"/>
      <text:list text:style-name="L1">
        <text:list-item>
          <text:p text:style-name="P6">Connect the <text:span text:style-name="T2">NUC</text:span> device to a power outlet. </text:p>
        </text:list-item>
        <text:list-item>
          <text:p text:style-name="P6">Plug the USB camera into one of the <text:span text:style-name="T3">NUC </text:span>device’s USB ports. </text:p>
        </text:list-item>
        <text:list-item>
          <text:p text:style-name="P6">Turn on the <text:span text:style-name="T4">NUC </text:span>device using the power button on the front panel. </text:p>
        </text:list-item>
        <text:list-item>
          <text:p text:style-name="P7">Turn on your laptop.</text:p>
        </text:list-item>
        <text:list-item>
          <text:p text:style-name="P8"><text:span text:style-name="T5">Download the required files from: </text:span><text:span text:style-name="Strong_20_Emphasis"><text:span text:style-name="T5">[download link]</text:span></text:span></text:p>
          <text:p text:style-name="P9">Required files:</text:p>
          <text:list>
            <text:list-item>
              <text:p text:style-name="P10">StartPreview</text:p>
            </text:list-item>
            <text:list-item>
              <text:p text:style-name="P11"><text:span text:style-name="Source_20_Text"><text:span text:style-name="T6">RunDemo</text:span></text:span></text:p>
            </text:list-item>
          </text:list>
        </text:list-item>
        <text:list-item>
          <text:p text:style-name="P6">Double-click <text:span text:style-name="T7">RunDemo</text:span> to start the demo. </text:p>
        </text:list-item>
        <text:list-item>
          <text:p text:style-name="P6">The first time you run the demo, you may see a security prompt asking for a passphrase. Simply press <text:span text:style-name="Strong_20_Emphasis">Enter</text:span> to skip the passphrase prompt (and press <text:span text:style-name="Strong_20_Emphasis">Enter</text:span> again if asked to confirm). When prompted for a password, enter the credentials <text:span text:style-name="T8">(Password: </text:span><text:span text:style-name="T9">IntelDemo</text:span><text:span text:style-name="T10">)</text:span> and continue.</text:p>
        </text:list-item>
        <text:list-item>
          <text:p text:style-name="P12">When the demo is running, a browser window will open automatically.</text:p>
        </text:list-item>
      </text:list>
      <text:p text:style-name="P13">If this <text:span text:style-name="T11">does not work, use </text:span><text:span text:style-name="T12">Option B</text:span><text:span text:style-name="T11"> below.</text:span></text:p>
      <text:h text:style-name="P14" text:outline-level="3">Closing the Demo Safely <text:span text:style-name="T11">(Option A)</text:span></text:h>
      <text:list text:style-name="L2">
        <text:list-item>
          <text:p text:style-name="P15">Close the browser window first. </text:p>
        </text:list-item>
        <text:list-item>
          <text:p text:style-name="P16"><text:span text:style-name="T5">Click the terminal window that opened when you started </text:span><text:span text:style-name="T13">RunDemo</text:span><text:span text:style-name="T5">.</text:span></text:p>
        </text:list-item>
        <text:list-item>
          <text:p text:style-name="P17"><text:span text:style-name="T5">Press </text:span><text:span text:style-name="T14">Enter</text:span><text:span text:style-name="T15"> to stop the demo safely</text:span><text:span text:style-name="T5">.</text:span></text:p>
        </text:list-item>
      </text:list>
      <text:p text:style-name="P18">To safely turn off the NUC device, look at the last page of this manual.</text:p>
      <text:p text:style-name="P19"/>
      <text:p text:style-name="P20">B. Setting up <text:span text:style-name="T16">t</text:span>he Demo on the <text:span text:style-name="T17">D</text:span>evice <text:span text:style-name="T17">D</text:span>irectly <text:span text:style-name="T18">(Fallback)</text:span></text:p>
      <text:p text:style-name="P21">Use this option only if option A fails.</text:p>
      <text:p text:style-name="P22"/>
      <text:p text:style-name="P23"><text:tab/>Requirements:</text:p>
      <text:list text:style-name="L3">
        <text:list-item>
          <text:list>
            <text:list-item>
              <text:p text:style-name="P24">keyboard</text:p>
            </text:list-item>
            <text:list-item>
              <text:p text:style-name="P24">mouse</text:p>
            </text:list-item>
          </text:list>
        </text:list-item>
      </text:list>
      <text:p text:style-name="P22"/>
      <text:list text:style-name="L4">
        <text:list-item>
          <text:p text:style-name="P25">Connect the <text:span text:style-name="T19">NUC</text:span> device to a power outlet.</text:p>
        </text:list-item>
        <text:list-item>
          <text:p text:style-name="P25">Plug the USB camera into one of the <text:span text:style-name="T20">NUC </text:span>device’s USB ports.</text:p>
        </text:list-item>
        <text:list-item>
          <text:p text:style-name="P25">Plug in your keyboard and mouse into the <text:span text:style-name="T21">NUC </text:span>device’<text:span text:style-name="T21">s</text:span> ports.</text:p>
        </text:list-item>
        <text:list-item>
          <text:p text:style-name="P26">Turn on the <text:span text:style-name="T22">NUC </text:span>device using the power button on the front panel.</text:p>
        </text:list-item>
        <text:list-item>
          <text:p text:style-name="P27"><text:span text:style-name="T23">At</text:span> log, <text:span text:style-name="T23">sign</text:span> in <text:span text:style-name="T24">as</text:span> sshuser <text:span text:style-name="T23">using the provided credentials</text:span> <text:span text:style-name="T8">(Password: </text:span><text:span text:style-name="T9">IntelDemo</text:span><text:span text:style-name="T8">).</text:span></text:p>
        </text:list-item>
        <text:list-item>
          <text:p text:style-name="P28">Once logged in search for “RunDemo” and double-click it to start the <text:span text:style-name="T25">d</text:span>emo.</text:p>
        </text:list-item>
      </text:list>
      <text:p text:style-name="P29"><text:soft-page-break/></text:p>
      <text:h text:style-name="P30" text:outline-level="3">Closing the Demo Safely <text:span text:style-name="T26">(Option B)</text:span></text:h>
      <text:list text:style-name="L5">
        <text:list-item>
          <text:p text:style-name="P31">Close the browser window first.</text:p>
        </text:list-item>
        <text:list-item>
          <text:p text:style-name="P31">Then click the window that opened when you started RunDemo.</text:p>
        </text:list-item>
        <text:list-item>
          <text:p text:style-name="P31">Press <text:span text:style-name="T27">Ctrl</text:span><text:span text:style-name="T28"> </text:span><text:span text:style-name="T29">+</text:span><text:span text:style-name="T28"> </text:span><text:span text:style-name="T27">C</text:span><text:span text:style-name="T28"> </text:span><text:span text:style-name="T29">t</text:span><text:span text:style-name="T28">o stop the demo safely.</text:span></text:p>
        </text:list-item>
      </text:list>
      <text:p text:style-name="P32"/>
      <text:p text:style-name="P33">Turning off the NUC device safely</text:p>
      <text:list text:style-name="L6">
        <text:list-item>
          <text:p text:style-name="P34">Locate the power button on the NUC device’s front panel.</text:p>
        </text:list-item>
        <text:list-item>
          <text:p text:style-name="P35">Click the power button and hold it <text:span text:style-name="T30">for approximately five seconds and then wait </text:span>until the light turns off.</text:p>
        </text:list-item>
        <text:list-item>
          <text:p text:style-name="P35">You can now safely unplug the NUC device from a power outlet.</text:p>
        </text:list-item>
      </text:list>
      <text:p text:style-name="P36"/>
      <text:p text:style-name="P36"/>
      <text:p text:style-name="P37">If something stops working:</text:p>
      <text:p text:style-name="P38"><text:tab/><text:span text:style-name="T31">1. </text:span><text:span text:style-name="T32">If the script</text:span><text:span text:style-name="T33"> cannot connect to </text:span><text:span text:style-name="T34">the </text:span><text:span text:style-name="T33">demo and </text:span><text:span text:style-name="T35">a globe icon appears in the bottom-left corner of the screen:</text:span></text:p>
      <text:list text:style-name="L7">
        <text:list-item>
          <text:p text:style-name="P39">Restart your device</text:p>
        </text:list-item>
      </text:list>
      <text:p text:style-name="P40"><text:span text:style-name="T36"><text:tab/>2.</text:span><text:span text:style-name="T37"> </text:span><text:span text:style-name="T38">I</text:span><text:span text:style-name="T36">f</text:span><text:span text:style-name="T39"> the script shows yellow text or says "RETRYABLE_SSH_FAILURE" it means you have disconnected from the “IntelDemoWLAN” network:</text:span></text:p>
      <text:list text:style-name="L8">
        <text:list-item>
          <text:p text:style-name="P41">Manually connect to the “IntelDemoWLAN” network (Password: <text:span text:style-name="T27">IntelDemo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24T22:14:54.341811400</dc:date>
    <meta:editing-duration>PT1H8M5S</meta:editing-duration>
    <meta:editing-cycles>56</meta:editing-cycles>
    <meta:generator>LibreOffice/25.8.6.2$Windows_X86_64 LibreOffice_project/b4b39682cd9868fa725bc664aff94278d315bd04</meta:generator>
    <meta:document-statistic meta:table-count="0" meta:image-count="0" meta:object-count="0" meta:page-count="2" meta:paragraph-count="45" meta:word-count="430" meta:character-count="2345" meta:non-whitespace-character-count="1980"/>
  </office:meta>
</office:document-meta>
</file>